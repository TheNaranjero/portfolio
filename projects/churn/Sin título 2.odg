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1cm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898989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98989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5.3cm" svg:height="1.3cm" svg:x="1cm" svg:y="1cm">
          <text:p text:style-name="P1">Villarruel (37)</text:p>
        </draw:rect>
        <draw:rect draw:style-name="gr1" draw:text-style-name="P2" draw:layer="layout" svg:width="5.3cm" svg:height="15.4cm" svg:x="1cm" svg:y="2.5cm">
          <text:p text:style-name="P1"><text:span text:style-name="T1">Abuelo y Abuela (2)</text:span></text:p>
          <text:p text:style-name="P1"><text:span text:style-name="T1"/></text:p>
          <text:p text:style-name="P1"><text:span text:style-name="T1">Tio Juan (8)</text:span></text:p>
          <text:p text:style-name="P1"><text:span text:style-name="T2">Tia Vero</text:span></text:p>
          <text:p text:style-name="P1"><text:span text:style-name="T2">Lauti</text:span><text:span text:style-name="T2"><text:line-break/></text:span><text:span text:style-name="T2">Franco</text:span></text:p>
          <text:p text:style-name="P1"><text:span text:style-name="T3">Luci y Paulo</text:span></text:p>
          <text:p text:style-name="P1"><text:span text:style-name="T4">Dana y Leo</text:span></text:p>
          <text:p text:style-name="P1"><text:span text:style-name="T2"/></text:p>
          <text:p text:style-name="P1"><text:span text:style-name="T1">Tio Betito (3)</text:span></text:p>
          <text:p text:style-name="P1"><text:span text:style-name="T2">Eli</text:span></text:p>
          <text:p text:style-name="P1"><text:span text:style-name="T2">Luján</text:span></text:p>
          <text:p text:style-name="P1"><text:span text:style-name="T1"/></text:p>
          <text:p text:style-name="P1"><text:span text:style-name="T1">Tia Mari(7)</text:span></text:p>
          <text:p text:style-name="P1"><text:span text:style-name="T3">Tio Carlos</text:span></text:p>
          <text:p text:style-name="P1"><text:span text:style-name="T3">Jimena</text:span></text:p>
          <text:p text:style-name="P1"><text:span text:style-name="T3">Agustin y</text:span><text:span text:style-name="T1"> </text:span><text:span text:style-name="T3">Natalia</text:span></text:p>
          <text:p text:style-name="P1"><text:span text:style-name="T5">Vigo y Lena</text:span></text:p>
          <text:p text:style-name="P1"><text:span text:style-name="T1"/></text:p>
          <text:p text:style-name="P1"><text:span text:style-name="T1">Tia Nati (5)</text:span></text:p>
          <text:p text:style-name="P1"><text:span text:style-name="T3">Tio German</text:span></text:p>
          <text:p text:style-name="P1"><text:span text:style-name="T3">Bauta</text:span></text:p>
          <text:p text:style-name="P1"><text:span text:style-name="T3">Inu y novia</text:span></text:p>
          <text:p text:style-name="P1"><text:span text:style-name="T3"/></text:p>
          <text:p text:style-name="P1"><text:span text:style-name="T1">Cecilia y familia (5)</text:span></text:p>
          <text:p text:style-name="P1"><text:span text:style-name="T6">Nati y familia (5</text:span><text:span text:style-name="T1">)</text:span></text:p>
          <text:p text:style-name="P1"><text:span text:style-name="T1">Manuel y novia (2)</text:span></text:p>
        </draw:rect>
        <draw:rect draw:style-name="gr1" draw:text-style-name="P1" draw:layer="layout" svg:width="5.4cm" svg:height="1.3cm" svg:x="6.7cm" svg:y="1cm">
          <text:p text:style-name="P1">Arán (26)</text:p>
        </draw:rect>
        <draw:rect draw:style-name="gr1" draw:text-style-name="P2" draw:layer="layout" svg:width="4.8cm" svg:height="13.1cm" svg:x="12.7cm" svg:y="2.5cm">
          <text:p text:style-name="P1"><text:span text:style-name="T1">Rosario (11)</text:span></text:p>
          <text:p text:style-name="P1"><text:span text:style-name="T3">Joaquin y Novio</text:span></text:p>
          <text:p text:style-name="P1"><text:span text:style-name="T3">Pablo y Novio</text:span></text:p>
          <text:p text:style-name="P1"><text:span text:style-name="T3">Pablo abogado</text:span></text:p>
          <text:p text:style-name="P1"><text:span text:style-name="T3">Nacho y Novia</text:span></text:p>
          <text:p text:style-name="P1"><text:span text:style-name="T3">Lucho y Novia</text:span></text:p>
          <text:p text:style-name="P1"><text:span text:style-name="T3">Pibe Laucha</text:span></text:p>
          <text:p text:style-name="P1"><text:span text:style-name="T3"/></text:p>
          <text:p text:style-name="P1"><text:span text:style-name="T3">El Grego</text:span></text:p>
          <text:p text:style-name="P1"><text:span text:style-name="T1"/></text:p>
          <text:p text:style-name="P1"><text:span text:style-name="T1">San pedro (16)</text:span></text:p>
          <text:p text:style-name="P1"><text:span text:style-name="T3">Aye+Edu</text:span></text:p>
          <text:p text:style-name="P1"><text:span text:style-name="T3">Ale+Amiga</text:span></text:p>
          <text:p text:style-name="P1"><text:span text:style-name="T3">Nahuel (bombero)</text:span></text:p>
          <text:p text:style-name="P1"><text:span text:style-name="T3">Cristian (canta)</text:span></text:p>
          <text:p text:style-name="P1"><text:span text:style-name="T3">Eze (VEA)</text:span></text:p>
          <text:p text:style-name="P1"><text:span text:style-name="T3">Nico (abogado)</text:span></text:p>
          <text:p text:style-name="P1"><text:span text:style-name="T3">Joaquin (abeja)</text:span></text:p>
          <text:p text:style-name="P1"><text:span text:style-name="T3">Pocho, Mica y </text:span><text:span text:style-name="T5">Valen</text:span></text:p>
          <text:p text:style-name="P1"><text:span text:style-name="T3">Ivan, Vale y Alina</text:span></text:p>
          <text:p text:style-name="P1"><text:span text:style-name="T7">El Pipi</text:span></text:p>
          <text:p text:style-name="P1"><text:span text:style-name="T3"/></text:p>
          <text:p text:style-name="P1"><text:span text:style-name="T3">Santiagueño?</text:span></text:p>
          <text:p text:style-name="P1"><text:span text:style-name="T7">Cacha? Friki?</text:span></text:p>
        </draw:rect>
        <draw:rect draw:style-name="gr1" draw:text-style-name="P2" draw:layer="layout" svg:width="5.2cm" svg:height="13.6cm" svg:x="6.8cm" svg:y="2.5cm">
          <text:p text:style-name="P1"><text:span text:style-name="T1">Abuela (4)</text:span><text:span text:style-name="T1"><text:line-break/></text:span><text:span text:style-name="T3">Timido</text:span><text:span text:style-name="T3"><text:line-break/></text:span><text:span text:style-name="T3">Clari y Novio</text:span></text:p>
          <text:p text:style-name="P1"><text:span text:style-name="T1"/></text:p>
          <text:p text:style-name="P1"><text:span text:style-name="T1">Tio Marcelo (7)</text:span></text:p>
          <text:p text:style-name="P1"><text:span text:style-name="T2">Tia Marga</text:span></text:p>
          <text:p text:style-name="P1"><text:span text:style-name="T2">Fede</text:span><text:span text:style-name="T2"><text:line-break/></text:span><text:span text:style-name="T2">Piqui</text:span></text:p>
          <text:p text:style-name="P1"><text:span text:style-name="T7">Maira, Sofi y Tommy</text:span></text:p>
          <text:p text:style-name="P1"><text:span text:style-name="T2"/></text:p>
          <text:p text:style-name="P1"><text:span text:style-name="T1">Tia Lili (10)</text:span></text:p>
          <text:p text:style-name="P1"><text:span text:style-name="T2">Tio más nuevo</text:span></text:p>
          <text:p text:style-name="P1"><text:span text:style-name="T2">Andy</text:span></text:p>
          <text:p text:style-name="P1"><text:span text:style-name="T2">Mauro y Mica</text:span></text:p>
          <text:p text:style-name="P1"><text:span text:style-name="T2">Leo, novia y </text:span><text:span text:style-name="T4">bebe</text:span></text:p>
          <text:p text:style-name="P1"><text:span text:style-name="T2">Flor y mirco</text:span></text:p>
          <text:p text:style-name="P1"><text:span text:style-name="T1"/></text:p>
          <text:p text:style-name="P1"><text:span text:style-name="T1">Tia Eli (2)</text:span></text:p>
          <text:p text:style-name="P1"><text:span text:style-name="T3">Tio Carlos</text:span></text:p>
          <text:p text:style-name="P1"><text:span text:style-name="T1"/></text:p>
          <text:p text:style-name="P1"><text:span text:style-name="T1">Tia Kari (3)</text:span></text:p>
          <text:p text:style-name="P1"><text:span text:style-name="T3">Tio Mojarra</text:span></text:p>
          <text:p text:style-name="P1"><text:span text:style-name="T3">Kika</text:span></text:p>
          <text:p text:style-name="P1"><text:span text:style-name="T7">Madrina? Marita?</text:span></text:p>
        </draw:rect>
        <draw:rect draw:style-name="gr1" draw:text-style-name="P1" draw:layer="layout" svg:width="4.8cm" svg:height="1.3cm" svg:x="12.7cm" svg:y="1cm">
          <text:p text:style-name="P1">Amigos (27)</text:p>
        </draw:rect>
        <draw:rect draw:style-name="gr2" draw:text-style-name="P3" draw:layer="layout" svg:width="4.9cm" svg:height="4.1cm" svg:x="12.7cm" svg:y="17.3cm">
          <text:p text:style-name="P1"><text:span text:style-name="T3">Madre</text:span></text:p>
          <text:p text:style-name="P1"><text:span text:style-name="T3">Padre</text:span></text:p>
          <text:p text:style-name="P1"><text:span text:style-name="T3">Rodri</text:span></text:p>
          <text:p text:style-name="P1"><text:span text:style-name="T3">Clara</text:span></text:p>
          <text:p text:style-name="P1"><text:span text:style-name="T5">Emma</text:span></text:p>
          <text:p text:style-name="P1"><text:span text:style-name="T3">Alma</text:span></text:p>
          <text:p text:style-name="P1"><text:span text:style-name="T3">Leonora? Camila?</text:span></text:p>
        </draw:rect>
        <draw:rect draw:style-name="gr1" draw:text-style-name="P1" draw:layer="layout" svg:width="4.9cm" svg:height="1.3cm" svg:x="12.7cm" svg:y="15.8cm">
          <text:p text:style-name="P1">Famila (8)</text:p>
        </draw:rect>
        <draw:rect draw:style-name="gr3" draw:text-style-name="P1" draw:layer="layout" svg:width="5.1cm" svg:height="1.3cm" svg:x="1cm" svg:y="18.6cm">
          <text:p text:style-name="P1">Cardozo (11)</text:p>
        </draw:rect>
        <draw:rect draw:style-name="gr3" draw:text-style-name="P2" draw:layer="layout" svg:width="5.2cm" svg:height="8.7cm" svg:x="1cm" svg:y="20.3cm">
          <text:p text:style-name="P1"><text:span text:style-name="T1">Abuela (1)</text:span></text:p>
          <text:p text:style-name="P1"><text:span text:style-name="T1"/></text:p>
          <text:p text:style-name="P1"><text:span text:style-name="T1">Mamá (2)</text:span></text:p>
          <text:p text:style-name="P1"><text:span text:style-name="T3">Anto</text:span></text:p>
          <text:p text:style-name="P1"><text:span text:style-name="T1"/></text:p>
          <text:p text:style-name="P1"><text:span text:style-name="T1">Tia Rosa (3)</text:span></text:p>
          <text:p text:style-name="P1"><text:span text:style-name="T2">Juli y Nico</text:span></text:p>
          <text:p text:style-name="P1"><text:span text:style-name="T2"/></text:p>
          <text:p text:style-name="P1"><text:span text:style-name="T1">Tio Tito(5)</text:span></text:p>
          <text:p text:style-name="P1"><text:span text:style-name="T2">Mariela</text:span></text:p>
          <text:p text:style-name="P1"><text:span text:style-name="T2">Rafaela</text:span></text:p>
          <text:p text:style-name="P1"><text:span text:style-name="T4">Fermina</text:span></text:p>
          <text:p text:style-name="P1"><text:span text:style-name="T2">Caytana</text:span></text:p>
          <text:p text:style-name="P1"><text:span text:style-name="T3"/></text:p>
          <text:p text:style-name="P1"><text:span text:style-name="T3">Franco y Agostina?</text:span></text:p>
        </draw:rect>
        <draw:rect draw:style-name="gr3" draw:text-style-name="P1" draw:layer="layout" svg:width="5.1cm" svg:height="1.3cm" svg:x="6.9cm" svg:y="16.3cm">
          <text:p text:style-name="P1">Parra (18)</text:p>
        </draw:rect>
        <draw:rect draw:style-name="gr3" draw:text-style-name="P2" draw:layer="layout" svg:width="5.2cm" svg:height="11.2cm" svg:x="6.8cm" svg:y="17.8cm">
          <text:p text:style-name="P1"><text:span text:style-name="T1">Abuelo y Abuela (2)</text:span></text:p>
          <text:p text:style-name="P1"><text:span text:style-name="T1"/></text:p>
          <text:p text:style-name="P1"><text:span text:style-name="T1">Papá (1)</text:span></text:p>
          <text:p text:style-name="P1"><text:span text:style-name="T1"/></text:p>
          <text:p text:style-name="P1"><text:span text:style-name="T1">Tia Andrea(5)</text:span></text:p>
          <text:p text:style-name="P1"><text:span text:style-name="T2">Tio Fabián</text:span></text:p>
          <text:p text:style-name="P1"><text:span text:style-name="T2">Pablo</text:span></text:p>
          <text:p text:style-name="P1"><text:span text:style-name="T2">Fede y Valen</text:span></text:p>
          <text:p text:style-name="P1"><text:span text:style-name="T2"/></text:p>
          <text:p text:style-name="P1"><text:span text:style-name="T1">Tio Edu (4)</text:span></text:p>
          <text:p text:style-name="P1"><text:span text:style-name="T2">Gisella</text:span></text:p>
          <text:p text:style-name="P1"><text:span text:style-name="T2">Franco</text:span></text:p>
          <text:p text:style-name="P1"><text:span text:style-name="T2">Emma</text:span></text:p>
          <text:p text:style-name="P1"><text:span text:style-name="T2"/></text:p>
          <text:p text:style-name="P1"><text:span text:style-name="T1">Tia Caro (6)</text:span></text:p>
          <text:p text:style-name="P1"><text:span text:style-name="T3">Tio Claudio</text:span></text:p>
          <text:p text:style-name="P1"><text:span text:style-name="T3">Piper y Matu</text:span></text:p>
          <text:p text:style-name="P1"><text:span text:style-name="T3">Delfina</text:span></text:p>
          <text:p text:style-name="P1"><text:span text:style-name="T3">Rena</text:span></text:p>
        </draw:rect>
        <draw:rect draw:style-name="gr3" draw:text-style-name="P3" draw:layer="layout" svg:width="4.6cm" svg:height="5cm" svg:x="12.9cm" svg:y="23.7cm">
          <text:p text:style-name="P1"><text:span text:style-name="T3">Meri y novio</text:span></text:p>
          <text:p text:style-name="P1"><text:span text:style-name="T3">Chini</text:span></text:p>
          <text:p text:style-name="P1"><text:span text:style-name="T3"/></text:p>
          <text:p text:style-name="P1"><text:span text:style-name="T3">Novio de Chini?</text:span></text:p>
        </draw:rect>
        <draw:rect draw:style-name="gr3" draw:text-style-name="P1" draw:layer="layout" svg:width="4.7cm" svg:height="1.3cm" svg:x="12.8cm" svg:y="22.1cm">
          <text:p text:style-name="P1">Amigas (3)</text:p>
        </draw:rect>
      </draw:page>
      <draw:page draw:name="page2" draw:style-name="dp1" draw:master-page-name="Predeterminado">
        <draw:rect draw:style-name="gr4" draw:text-style-name="P1" draw:layer="layout" svg:width="7.4cm" svg:height="8.2cm" svg:x="7.2cm" svg:y="1cm">
          <text:p text:style-name="P1">Mesa 0: Prof. Novia y Lic. Novio</text:p>
          <text:p text:style-name="P1"/>
          <text:p text:style-name="P1">Novia y Novio</text:p>
          <text:p text:style-name="P1">Chini y <text:s/>??</text:p>
          <text:p text:style-name="P1">Meri y Novio</text:p>
          <text:p text:style-name="P1">El Grego</text:p>
          <text:p text:style-name="P1">¿Rodri?<text:line-break/>Ale y¿Amiga?</text:p>
          <text:p text:style-name="P1">Aye y Edu</text:p>
        </draw:rect>
        <draw:rect draw:style-name="gr4" draw:text-style-name="P1" draw:layer="layout" svg:width="7.4cm" svg:height="8.2cm" svg:x="19.4cm" svg:y="9.4cm">
          <text:p text:style-name="P1">Mesa 1: La tribu</text:p>
          <text:p text:style-name="P1"/>
          <text:p text:style-name="P1">Madre y Padre</text:p>
          <text:p text:style-name="P1">Clara, Emma</text:p>
          <text:p text:style-name="P1">Mamanovia</text:p>
          <text:p text:style-name="P1">Tia Rosa</text:p>
          <text:p text:style-name="P1">Juli y nico</text:p>
          <text:p text:style-name="P1">Tio Tito</text:p>
          <text:p text:style-name="P1">Mariela</text:p>
          <text:p text:style-name="P1">Abuela</text:p>
          <text:p text:style-name="P1"/>
        </draw:rect>
        <draw:rect draw:style-name="gr5" draw:text-style-name="P1" draw:layer="layout" svg:width="7.4cm" svg:height="8.2cm" svg:x="2.6cm" svg:y="9.5cm">
          <text:p text:style-name="P1">Mesa 9: Los Parra</text:p>
          <text:p text:style-name="P1"/>
          <text:p text:style-name="P1">Papanovia</text:p>
          <text:p text:style-name="P1">Abuela y Abuelo</text:p>
          <text:p text:style-name="P1">Tia Andrea y Fabian</text:p>
          <text:p text:style-name="P1">Tia Caro y Claudio</text:p>
          <text:p text:style-name="P1">Tio Eduardo y Gisella</text:p>
          <text:p text:style-name="P1">___</text:p>
          <text:p text:style-name="P1"/>
          <text:p text:style-name="P1"/>
        </draw:rect>
        <draw:rect draw:style-name="gr4" draw:text-style-name="P1" draw:layer="layout" svg:width="7.4cm" svg:height="8.2cm" svg:x="11.2cm" svg:y="9.5cm">
          <text:p text:style-name="P1">Mesa 2: Los Villarruel</text:p>
          <text:p text:style-name="P1"/>
          <text:p text:style-name="P1">Abuela y Abuelo</text:p>
          <text:p text:style-name="P1">Tia Nati y Tio Ger</text:p>
          <text:p text:style-name="P1">Tio Juan y Vero</text:p>
          <text:p text:style-name="P1">Tio Betirto y Eli</text:p>
          <text:p text:style-name="P1">Tia Mari y Carlos</text:p>
          <text:p text:style-name="P1"/>
        </draw:rect>
        <draw:rect draw:style-name="gr5" draw:text-style-name="P1" draw:layer="layout" svg:width="7.4cm" svg:height="8.2cm" svg:x="-5.4cm" svg:y="27.7cm">
          <text:p text:style-name="P1">Mesa 3: Los Primos V</text:p>
          <text:p text:style-name="P1"/>
          <text:p text:style-name="P1">Ines + Novia</text:p>
          <text:p text:style-name="P1">Franco y Lautaro</text:p>
          <text:p text:style-name="P1">Jimena</text:p>
          <text:p text:style-name="P1">Agustin y Nati</text:p>
          <text:p text:style-name="P1">(Vigo y Lena)</text:p>
          <text:p text:style-name="P1">Lujan</text:p>
          <text:p text:style-name="P1">Lucia + 3</text:p>
          <text:p text:style-name="P1"/>
        </draw:rect>
        <draw:rect draw:style-name="gr5" draw:text-style-name="P1" draw:layer="layout" svg:width="7.4cm" svg:height="8.2cm" svg:x="19.5cm" svg:y="18.7cm">
          <text:p text:style-name="P1">Mesa 8: Los Primos P</text:p>
          <text:p text:style-name="P1"/>
          <text:p text:style-name="P1">Pablo</text:p>
          <text:p text:style-name="P1">Fede y Valen</text:p>
          <text:p text:style-name="P1">Anto</text:p>
          <text:p text:style-name="P1">Rena y Delfi</text:p>
          <text:p text:style-name="P1">¿Franco y Agostina?</text:p>
        </draw:rect>
        <draw:rect draw:style-name="gr5" draw:text-style-name="P1" draw:layer="layout" svg:width="7.4cm" svg:height="8.2cm" svg:x="20cm" svg:y="27.9cm">
          <text:p text:style-name="P1">Mesa 10: Los Peques</text:p>
          <text:p text:style-name="P1"/>
          <text:p text:style-name="P1">Alma +2</text:p>
          <text:p text:style-name="P1">Bauta</text:p>
          <text:p text:style-name="P1">Piper</text:p>
          <text:p text:style-name="P1">Matu</text:p>
          <text:p text:style-name="P1">Franco<text:line-break/>Emma</text:p>
          <text:p text:style-name="P1">Rafa</text:p>
          <text:p text:style-name="P1">Caetana</text:p>
          <text:p text:style-name="P1">Fermina</text:p>
        </draw:rect>
        <draw:rect draw:style-name="gr4" draw:text-style-name="P1" draw:layer="layout" svg:width="7.4cm" svg:height="8.2cm" svg:x="-5.6cm" svg:y="9.5cm">
          <text:p text:style-name="P1">Mesa 4: Los Arán</text:p>
          <text:p text:style-name="P1"/>
          <text:p text:style-name="P1">Abuela y Timido</text:p>
          <text:p text:style-name="P1">Tio Marcelo y Marga</text:p>
          <text:p text:style-name="P1">Tia Kari y Mojarra</text:p>
          <text:p text:style-name="P1">Tia Eli y Tio Nuevo</text:p>
          <text:p text:style-name="P1">Tia Lili y Tio Mas Nuevo</text:p>
        </draw:rect>
        <draw:rect draw:style-name="gr5" draw:text-style-name="P1" draw:layer="layout" svg:width="7.4cm" svg:height="8.2cm" svg:x="-5.4cm" svg:y="18.5cm">
          <text:p text:style-name="P1">Mesa 5: Los Primos A</text:p>
          <text:p text:style-name="P1"/>
          <text:p text:style-name="P1">Fede y Piqui</text:p>
          <text:p text:style-name="P1">Maira, Sofi, Tomy</text:p>
          <text:p text:style-name="P1">Kika</text:p>
          <text:p text:style-name="P1">Mauro y Mica y bebe</text:p>
          <text:p text:style-name="P1">Leo y Novialeo y bebe</text:p>
          <text:p text:style-name="P1">Flor y Mirco</text:p>
          <text:p text:style-name="P1">Andy y novia rocio</text:p>
        </draw:rect>
        <draw:rect draw:style-name="gr5" draw:text-style-name="P1" draw:layer="layout" svg:width="7.4cm" svg:height="8.2cm" svg:x="-14.7cm" svg:y="28.2cm">
          <text:p text:style-name="P1">Mesa 99: Los Rosarinos</text:p>
          <text:p text:style-name="P1"/>
          <text:p text:style-name="P1">Joaco y Novio</text:p>
          <text:p text:style-name="P1">Pablo y Marido</text:p>
          <text:p text:style-name="P1">Nacho (y novia)</text:p>
          <text:p text:style-name="P1">Pablo abog.</text:p>
          <text:p text:style-name="P1">Lucho (y novia)</text:p>
          <text:p text:style-name="P1">Pibe laucha</text:p>
          <text:p text:style-name="P1">Friki?</text:p>
        </draw:rect>
        <draw:rect draw:style-name="gr5" draw:text-style-name="P1" draw:layer="layout" svg:width="7.4cm" svg:height="8.2cm" svg:x="29.9cm" svg:y="28cm">
          <text:p text:style-name="P1">Mesa 98: Los San Pedrinos</text:p>
          <text:p text:style-name="P1"/>
          <text:p text:style-name="P1">Abogado</text:p>
          <text:p text:style-name="P1">Abeja</text:p>
          <text:p text:style-name="P1">VEA</text:p>
          <text:p text:style-name="P1">Pocho,( Mica y valen)</text:p>
          <text:p text:style-name="P1">Ivan, (Vale y Alina)</text:p>
          <text:p text:style-name="P1">Cristian</text:p>
          <text:p text:style-name="P1">El Pipi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6-23T22:41:41.53</meta:creation-date>
    <meta:editing-duration>P7DT8H23M39S</meta:editing-duration>
    <meta:editing-cycles>2</meta:editing-cycles>
    <meta:generator>OpenOffice/4.1.15$Win32 OpenOffice.org_project/4115m2$Build-9813</meta:generator>
    <meta:initial-creator>Eduardo Andres Villarruel</meta:initial-creator>
    <dc:date>2026-06-23T22:44:18.35</dc:date>
    <dc:creator>Eduardo Andres Villarruel</dc:creator>
    <meta:document-statistic meta:object-count="25"/>
  </office:meta>
</office:document-meta>
</file>